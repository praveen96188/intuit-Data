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Monaco" svg:font-family="Monaco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99in"/>
    </style:style>
    <style:style style:name="co2" style:family="table-column">
      <style:table-column-properties fo:break-before="auto" style:column-width="3.3035in"/>
    </style:style>
    <style:style style:name="co3" style:family="table-column">
      <style:table-column-properties fo:break-before="auto" style:column-width="7.295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236in"/>
    </style:style>
    <style:style style:name="co6" style:family="table-column">
      <style:table-column-properties fo:break-before="auto" style:column-width="4.3228in"/>
    </style:style>
    <style:style style:name="co7" style:family="table-column">
      <style:table-column-properties fo:break-before="auto" style:column-width="7.3028in"/>
    </style:style>
    <style:style style:name="co8" style:family="table-column">
      <style:table-column-properties fo:break-before="auto" style:column-width="4.8874in"/>
    </style:style>
    <style:style style:name="co9" style:family="table-column">
      <style:table-column-properties fo:break-before="auto" style:column-width="2.2925in"/>
    </style:style>
    <style:style style:name="co10" style:family="table-column">
      <style:table-column-properties fo:break-before="auto" style:column-width="12.9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89in" fo:break-before="auto" style:use-optimal-row-height="true"/>
    </style:style>
    <style:style style:name="ro5" style:family="table-row">
      <style:table-row-properties style:row-height="3.3299in" fo:break-before="auto" style:use-optimal-row-height="true"/>
    </style:style>
    <style:style style:name="ro6" style:family="table-row">
      <style:table-row-properties style:row-height="0.8047in" fo:break-before="auto" style:use-optimal-row-height="true"/>
    </style:style>
    <style:style style:name="ro7" style:family="table-row">
      <style:table-row-properties style:row-height="1.278in" fo:break-before="auto" style:use-optimal-row-height="true"/>
    </style:style>
    <style:style style:name="ro8" style:family="table-row">
      <style:table-row-properties style:row-height="0.3154in" fo:break-before="auto" style:use-optimal-row-height="true"/>
    </style:style>
    <style:style style:name="ro9" style:family="table-row">
      <style:table-row-properties style:row-height="7.9543in" fo:break-before="auto" style:use-optimal-row-height="true"/>
    </style:style>
    <style:style style:name="ro10" style:family="table-row">
      <style:table-row-properties style:row-height="0.189in" fo:break-before="auto" style:use-optimal-row-height="true"/>
    </style:style>
    <style:style style:name="ro11" style:family="table-row">
      <style:table-row-properties style:row-height="0.2917in" fo:break-before="auto" style:use-optimal-row-height="true"/>
    </style:style>
    <style:style style:name="ro12" style:family="table-row">
      <style:table-row-properties style:row-height="1.3965in" fo:break-before="auto" style:use-optimal-row-height="true"/>
    </style:style>
    <style:style style:name="ro13" style:family="table-row">
      <style:table-row-properties style:row-height="6.920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1.1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5ce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bold" style:font-name-complex="Menlo-Regular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Tahoma" style:font-name-complex="Tahoma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eeeeee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18" style:family="table-cell" style:parent-style-name="Default">
      <style:text-properties fo:color="#fff5ce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3" style:family="table-cell" style:parent-style-name="Default">
      <style:text-properties fo:color="#fff5ce" style:font-name="Menlo-Regular" fo:font-size="11pt" fo:language="none" fo:country="none" fo:font-weight="bold" style:font-name-asian="Menlo-Regular" style:font-size-asian="11pt" style:language-asian="none" style:country-asian="none" style:font-weight-asian="bold" style:font-name-complex="Menlo-Regular" style:font-size-complex="11pt" style:language-complex="none" style:country-complex="none" style:font-weight-complex="bold"/>
    </style:style>
    <style:style style:name="ce16" style:family="table-cell" style:parent-style-name="Default">
      <style:text-properties fo:color="#fff5ce" style:font-name="Liberation Serif" fo:font-size="10pt" fo:language="none" fo:country="none" fo:font-weight="normal" style:font-name-asian="Tahoma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17" style:family="table-cell" style:parent-style-name="Default">
      <style:text-properties fo:color="#fff5ce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fff5ce" style:font-name="Menlo-Regular" fo:font-size="11pt" fo:language="none" fo:country="none" style:text-underline-style="solid" style:text-underline-width="auto" style:text-underline-color="font-color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10" style:family="table-cell" style:parent-style-name="Default">
      <style:text-properties fo:color="#fff5ce"/>
    </style:style>
    <style:style style:name="ce4" style:family="table-cell" style:parent-style-name="Default">
      <style:text-properties fo:color="#ff4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f5c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f5ce" style:font-name="Calibri" fo:font-size="11pt" style:font-name-asian="Calibri" style:font-size-asian="11pt" style:font-name-complex="Calibri" style:font-size-complex="11pt"/>
    </style:style>
    <style:style style:name="ce7" style:family="table-cell" style:parent-style-name="Default">
      <style:text-properties fo:color="#ff4000"/>
    </style:style>
    <style:style style:name="ce8" style:family="table-cell" style:parent-style-name="Default">
      <style:text-properties style:font-name="Menlo-Regular" fo:font-size="12pt" fo:font-weight="bold" style:font-name-asian="Menlo-Regular" style:font-weight-asian="bold" style:font-name-complex="Menlo-Regular" style:font-weight-complex="bold"/>
    </style:style>
    <style:style style:name="ce26" style:family="table-cell" style:parent-style-name="Default">
      <style:text-properties fo:color="#000000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9" style:family="table-cell" style:parent-style-name="Default">
      <style:text-properties fo:color="#fff5ce" style:text-underline-style="solid" style:text-underline-width="auto" style:text-underline-color="font-color"/>
    </style:style>
    <style:style style:name="ce28" style:family="table-cell" style:parent-style-name="Default">
      <style:text-properties fo:color="#fff5c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dddddd" style:font-name="Menlo-Regular" fo:font-size="11pt" fo:language="none" fo:country="none" fo:font-weight="bold" style:font-name-asian="Menlo-Regular" style:font-size-asian="11pt" style:language-asian="none" style:country-asian="none" style:font-weight-asian="bold" style:font-name-complex="Menlo-Regular" style:font-size-complex="11pt" style:language-complex="none" style:country-complex="none" style:font-weight-complex="bold"/>
    </style:style>
    <style:style style:name="ce12" style:family="table-cell" style:parent-style-name="Default">
      <style:text-properties fo:color="#fff5ce" style:font-name="Menlo-Regular" fo:font-size="11pt" style:font-name-asian="Menlo-Regular" style:font-size-asian="11pt" style:font-name-complex="Menlo-Regular" style:font-size-complex="11pt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5ce"/>
    </style:style>
    <style:style style:name="T2" style:family="text">
      <style:text-properties fo:color="#fff5ce" style:font-name="Menlo-Regular" fo:font-size="11pt" style:font-name-asian="Menlo-Regular" style:font-name-complex="Menlo-Regular" style:font-size-asian="11pt" style:font-size-complex="11pt"/>
    </style:style>
    <style:style style:name="T3" style:family="text">
      <style:text-properties fo:color="#fff5ce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5ce" style:font-name="Calibri" fo:font-size="11pt" fo:font-weight="bold" style:font-name-asian="Calibri" style:font-name-complex="Calibri" style:font-size-asian="11pt" style:font-size-complex="11pt" style:font-weight-asian="bold" style:font-weight-complex="bold"/>
    </style:style>
    <style:style style:name="T5" style:family="text">
      <style:text-properties fo:color="#fff5ce" style:font-name="Monaco" fo:font-size="9pt" style:font-name-asian="Monaco" style:font-name-complex="Monaco" style:font-size-asian="9pt" style:font-size-complex="9pt"/>
    </style:style>
    <style:style style:name="T6" style:family="text">
      <style:text-properties fo:color="#fff5ce" style:font-name="Calibri" fo:font-size="11pt" style:font-name-asian="Calibri" style:font-name-complex="Calibri" style:font-size-asian="11pt" style:font-size-complex="11pt"/>
    </style:style>
    <style:style style:name="T7" style:family="text">
      <style:text-properties fo:color="#fff5ce" style:font-name="Calibri" fo:font-size="11pt" style:text-underline-style="solid" style:text-underline-width="auto" style:text-underline-color="font-color" style:font-name-asian="Calibri" style:font-name-complex="Calibri" style:font-size-asian="11pt" style:font-size-complex="11pt"/>
    </style:style>
    <style:style style:name="T8" style:family="text">
      <style:text-properties style:font-name="Menlo-Regular" fo:font-size="11pt" style:font-name-asian="Menlo-Regular" style:font-name-complex="Menlo-Regular" style:font-size-asian="11pt" style:font-size-complex="11pt"/>
    </style:style>
    <style:style style:name="T9" style:family="text">
      <style:text-properties style:font-name="Menlo-Regular" fo:font-size="15pt" style:font-name-asian="Menlo-Regular" style:font-name-complex="Menlo-Regular" style:font-size-asian="15pt" style:font-size-complex="15pt" fo:color="#dddddd"/>
    </style:style>
    <style:style style:name="T10" style:family="text">
      <style:text-properties style:font-name="Calibri" fo:font-size="11pt" fo:font-weight="bold" style:font-name-asian="Calibri" style:font-name-complex="Calibri" style:font-size-asian="11pt" style:font-size-complex="11pt" style:font-weight-asian="bold" style:font-weight-complex="bold"/>
    </style:style>
    <style:style style:name="T11" style:family="text">
      <style:text-properties style:font-name="Calibri" fo:font-size="11pt" style:font-name-asian="Calibri" style:font-name-complex="Calibri" style:font-size-asian="11pt" style:font-size-complex="11pt"/>
    </style:style>
    <style:style style:name="T12" style:family="text">
      <style:text-properties style:font-name="Calibri" fo:font-size="12pt" fo:font-weight="bold" style:font-name-asian="Calibri" style:font-name-complex="Calibri" style:font-size-asian="12pt" style:font-size-complex="12pt" style:font-weight-asian="bold" style:font-weight-complex="bold"/>
    </style:style>
    <style:style style:name="T13" style:family="text">
      <style:text-properties fo:color="#c9211e" style:font-name="Calibri" fo:font-size="11pt" fo:font-weight="bold" style:font-name-asian="Calibri" style:font-name-complex="Calibri" style:font-size-asian="11pt" style:font-size-complex="11pt" style:font-weight-asian="bold" style:font-weight-complex="bold"/>
    </style:style>
    <style:style style:name="T14" style:family="text">
      <style:text-properties fo:color="#c9211e" style:font-name="Monaco" fo:font-size="12pt" style:font-name-asian="Monaco" style:font-name-complex="Monaco" style:font-size-asian="12pt" style:font-size-complex="12pt"/>
    </style:style>
    <style:style style:name="T15" style:family="text">
      <style:text-properties fo:color="#c9211e" style:font-name="Calibri" fo:font-size="11pt" style:font-name-asian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rodu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2">
          <table:table-cell table:style-name="ce1" office:value-type="string" calcext:value-type="string">
            <text:p>Psp-prod-uw02</text:p>
          </table:table-cell>
          <table:table-cell table:style-name="ce3" office:value-type="string" calcext:value-type="string">
            <text:p>GlzmqVog^jr-UFr5</text:p>
          </table:table-cell>
          <table:table-cell table:style-name="ce18" office:value-type="string" calcext:value-type="string">
            <text:p><text:span text:style-name="T1">psql -h psp-prod-uw02.cluster-cjls0bohfgpq.us-west-2.rds.amazonaws.com -U postgres -p 5432 -d </text:span><text:span text:style-name="T2">pspapg02</text:span></text:p>
          </table:table-cell>
        </table:table-row>
        <table:table-row table:style-name="ro3">
          <table:table-cell table:style-name="ce1" office:value-type="string" calcext:value-type="string">
            <text:p>Psp-prod-ibob2</text:p>
          </table:table-cell>
          <table:table-cell table:style-name="ce3" office:value-type="string" calcext:value-type="string">
            <text:p>DfWoSkuO,Z2zzdPCLuLRyqjfttW=N5ZI</text:p>
          </table:table-cell>
          <table:table-cell table:style-name="ce18" office:value-type="string" calcext:value-type="string">
            <text:p>psql -h psp-prod-ibob.cluster-cjls0bohfgpq.us-west-2.rds.amazonaws.com -U postgres -p 5432 -d prodapgib</text:p>
          </table:table-cell>
        </table:table-row>
        <table:table-row table:style-name="ro3">
          <table:table-cell table:style-name="ce1" office:value-type="string" calcext:value-type="string">
            <text:p>Psp-prod-arc</text:p>
          </table:table-cell>
          <table:table-cell table:style-name="ce16" office:value-type="string" calcext:value-type="string">
            <text:p>X4ndKVY.dqb8,Kpp-70d5UylU917w^eH</text:p>
          </table:table-cell>
          <table:table-cell table:style-name="ce19" office:value-type="string" calcext:value-type="string">
            <text:p>psql -h psp-prod-arc.cluster-cjls0bohfgpq.us-west-2.rds.amazonaws.com -U intuadmin -p 5432 -d pspprdparc</text:p>
          </table:table-cell>
        </table:table-row>
        <table:table-row table:style-name="ro1">
          <table:table-cell table:style-name="ce2" office:value-type="string" calcext:value-type="string">
            <text:p>CHG6082801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chg5777223</text:p>
          </table:table-cell>
          <table:table-cell office:value-type="string" calcext:value-type="string">
            <text:p>latest</text:p>
          </table:table-cell>
          <table:table-cell/>
        </table:table-row>
        <table:table-row table:style-name="ro1">
          <table:table-cell table:style-name="ce2" office:value-type="string" calcext:value-type="string">
            <text:p>CHG5557349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>
            <text:p>CHG561587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s://intuit.service-now.com/now/nav/ui/classic/params/target/change_request.do%3Fsys_id%3D3256628687a3a690aba8ff77cebb35e3%26sysparm_stack%3D%26sysparm_view%3D" xlink:type="simple">CHG5402678</text:a>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Z2zzdPCLuLRy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2" office:value-type="string" calcext:value-type="string">
            <text:p>CHG46656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HG48111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HG508624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18" office:value-type="string" calcext:value-type="string">
            <text:p>psql -h ppsp-stg-pitparmo.cluster-cjls0bohfgpq.us-west-2.rds.amazonaws.com -d pitparmo -U postgres -p 5432</text:p>
          </table:table-cell>
        </table:table-row>
        <table:table-row table:style-name="ro1">
          <table:table-cell office:value-type="string" calcext:value-type="string">
            <text:p>1856ef78-f084-48b4-9220-b29cfd8557cc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psp-prod-uw02 GlzmqVog^jr-UFr5</text:p>
          </table:table-cell>
          <table:table-cell table:style-name="ce10"/>
        </table:table-row>
        <table:table-row table:style-name="ro3">
          <table:table-cell/>
          <table:table-cell table:style-name="ce17" office:value-type="string" calcext:value-type="string">
            <text:p>psp-prod-mon GlzmqVog^jr-UFr5</text:p>
          </table:table-cell>
          <table:table-cell table:style-name="ce10"/>
        </table:table-row>
        <table:table-row table:style-name="ro3">
          <table:table-cell/>
          <table:table-cell table:style-name="ce17" office:value-type="string" calcext:value-type="string">
            <text:p>ppsp-stg-pitparmo qrJi3wms3NlDZF31kjqL5VuZCUnZ_dE,</text:p>
          </table:table-cell>
          <table:table-cell table:style-name="ce10"/>
        </table:table-row>
        <table:table-row table:style-name="ro3">
          <table:table-cell table:style-name="ce18" office:value-type="string" calcext:value-type="string">
            <text:p>wms3NlDZF31kjqL5Vu</text:p>
          </table:table-cell>
          <table:table-cell table:style-name="ce17" office:value-type="string" calcext:value-type="string">
            <text:p>psp-prod-ibob2 DfWoSkuO,Z2zzdPCLuLRyqjfttW=N5ZI</text:p>
          </table:table-cell>
          <table:table-cell table:style-name="ce10"/>
        </table:table-row>
        <table:table-row table:style-name="ro3">
          <table:table-cell/>
          <table:table-cell table:style-name="ce17" office:value-type="string" calcext:value-type="string">
            <text:p>psp-prod-arc o=isfUJBCVvYAdZo^Z=PnG4fz3iRsxlJ</text:p>
          </table:table-cell>
          <table:table-cell table:style-name="ce10"/>
        </table:table-row>
        <table:table-row table:style-name="ro1" table:number-rows-repeated="9">
          <table:table-cell table:number-columns-repeated="3"/>
        </table:table-row>
        <table:table-row table:style-name="ro4">
          <table:table-cell office:value-type="string" calcext:value-type="string">
            <text:p>hrajoria: F%4mBxs*2G#Hz8</text:p>
            <text:p>ibhargav: L!sV2x*6gT#wP8q</text:p>
            <text:p>ssharma17: JklV2x*6gT#wIpdq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2" office:value-type="string" calcext:value-type="string">
            <text:p>—k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sion select pg_terminate_backend(pid) from pg_stat_activity where pid in ('78589');</text:p>
          </table:table-cell>
          <table:table-cell table:number-columns-repeated="2"/>
        </table:table-row>
        <table:table-row table:style-name="ro1" table:number-rows-repeated="53">
          <table:table-cell table:number-columns-repeated="3"/>
        </table:table-row>
        <table:table-row table:style-name="ro5">
          <table:table-cell office:value-type="string" calcext:value-type="string">
            <text:p>Praveen:</text:p>
            <text:p>========</text:p>
            <text:p>adsc_ro                 Z#bYxPV7Cf(TEb</text:p>
            <text:p>data_capture_role       7TKat#MLr(MZhW</text:p>
            <text:p>datalake_bootstrap      Ln#QQUH(F2vA7F</text:p>
            <text:p>datalake_debezium       Dw2q#h9z(UFkyC</text:p>
            <text:p>datalake_parity         EkgXqy7z1#(9Dq</text:p>
            <text:p>gbsg_data_ro            QZvTgJs6f#(2kL             </text:p>
            <text:p>pganalyze               77u6Az4Ta@k@</text:p>
            <text:p>postgres                W#JSkM(5(oqor2</text:p>
            <text:p/>
            <text:p>Mayank:</text:p>
            <text:p>=======</text:p>
            <text:p>psp_payroll_dm          wJ4#Car(4Z2Z75</text:p>
            <text:p>psp_veza_admin_usr      z9oHc#UyVFwK(g</text:p>
            <text:p>pspadm_owner            DYTrj(#3Wi3n7J</text:p>
            <text:p>pspapp                  y(EM#fLN7XybzL</text:p>
            <text:p>pspbatch_ro_user        RFEpR9(fb4#PwV</text:p>
            <text:p>pspbatch_rw_user        U7wdla5JL#fYpH</text:p>
            <text:p>pspread                 kUwbu5#(bPYEha</text:p>
            <text:p>psprjf                  ys9(VAp5#JxacQ</text:p>
          </table:table-cell>
          <table:table-cell table:number-columns-repeated="2"/>
        </table:table-row>
        <table:table-row table:style-name="ro1" table:number-rows-repeated="1324">
          <table:table-cell table:number-columns-repeated="3"/>
        </table:table-row>
        <table:table-row table:style-name="ro6">
          <table:table-cell office:value-type="string" calcext:value-type="string">
            <text:p>psp_prl_arc_app:  p@m6#Rz4v%9LW</text:p>
            <text:p>psp_prl_arc_read: vM#1!Kz$pN@8L</text:p>
            <text:p/>
            <text:p>psp_arc_app: 1Qa$VbCv8!Xm#Z</text:p>
            <text:p>psp_arc_read: <text:a xlink:href="mailto:b@T6" xlink:type="simple">b@T6</text:a>^Q!m2Nx#9W</text:p>
          </table:table-cell>
          <table:table-cell table:number-columns-repeated="2"/>
        </table:table-row>
      </table:table>
      <table:table table:name="Staging-DB-INfo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3">
          <table:table-cell table:style-name="ce4" office:value-type="string" calcext:value-type="string">
            <text:p>Monolith-staging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Cluster</text:p>
          </table:table-cell>
          <table:table-cell table:style-name="ce6" office:value-type="string" calcext:value-type="string">
            <text:p><text:s/>Ppsp-stg-pitparmo</text:p>
          </table:table-cell>
          <table:table-cell/>
        </table:table-row>
        <table:table-row table:style-name="ro1">
          <table:table-cell office:value-type="string" calcext:value-type="string">
            <text:p>DB: </text:p>
          </table:table-cell>
          <table:table-cell office:value-type="string" calcext:value-type="string">
            <text:p>pitparmo</text:p>
          </table:table-cell>
          <table:table-cell/>
        </table:table-row>
        <table:table-row table:style-name="ro7">
          <table:table-cell office:value-type="string" calcext:value-type="string">
            <text:p>Postgres</text:p>
          </table:table-cell>
          <table:table-cell table:style-name="ce8" office:value-type="string" calcext:value-type="string">
            <text:p>qrJi3wms3NlDZF31kjqL5VuZCUnZ_dE,</text:p>
          </table:table-cell>
          <table:table-cell office:value-type="string" calcext:value-type="string">
            <text:p>pspadm_owner:ppp3zu#JA7M5aa</text:p>
            <text:p>psp_prl_app:ViqB#N4uLG)a</text:p>
            <text:p>psp_prl_read:VrXdZcH6s#(1lS</text:p>
            <text:p>pspbatch_rw_user:YqXtHmW2s#(9iJ</text:p>
            <text:p>pspbatch_ro_user:DZysNcJ4s#(1lQ</text:p>
            <text:p>psp_prl_arc_app:p@m6#Rz4v%9LW</text:p>
            <text:p>psp_prl_arc_read:vM#1!Kz$pN@8L</text:p>
            <text:p>psprjf:JsiHKoB7s#(5yW</text:p>
          </table:table-cell>
        </table:table-row>
        <table:table-row table:style-name="ro3">
          <table:table-cell table:style-name="ce6" office:value-type="string" calcext:value-type="string">
            <text:p>pspadm_owner</text:p>
          </table:table-cell>
          <table:table-cell table:style-name="ce6" office:value-type="string" calcext:value-type="string">
            <text:p>ppp3zu#JA7M5aa</text:p>
          </table:table-cell>
          <table:table-cell/>
        </table:table-row>
        <table:table-row table:style-name="ro3">
          <table:table-cell table:style-name="ce6" office:value-type="string" calcext:value-type="string">
            <text:p>psp_prl_app</text:p>
          </table:table-cell>
          <table:table-cell table:style-name="ce6" office:value-type="string" calcext:value-type="string">
            <text:p>ViqB#N4uLG)a</text:p>
          </table:table-cell>
          <table:table-cell/>
        </table:table-row>
        <table:table-row table:style-name="ro3">
          <table:table-cell table:style-name="ce6" office:value-type="string" calcext:value-type="string">
            <text:p>psp_prl_read: </text:p>
          </table:table-cell>
          <table:table-cell table:style-name="ce6" office:value-type="string" calcext:value-type="string">
            <text:p>VrXdZcH5s#(1lS</text:p>
          </table:table-cell>
          <table:table-cell/>
        </table:table-row>
        <table:table-row table:style-name="ro3">
          <table:table-cell table:style-name="ce6" office:value-type="string" calcext:value-type="string">
            <text:p>pspbatch_rw_user</text:p>
          </table:table-cell>
          <table:table-cell table:style-name="ce6" office:value-type="string" calcext:value-type="string">
            <text:p>YqXwHmW2s#(9iJ</text:p>
          </table:table-cell>
          <table:table-cell/>
        </table:table-row>
        <table:table-row table:style-name="ro3">
          <table:table-cell table:style-name="ce6" office:value-type="string" calcext:value-type="string">
            <text:p>pspbatch_ro_user </text:p>
          </table:table-cell>
          <table:table-cell table:style-name="ce6" office:value-type="string" calcext:value-type="string">
            <text:p>DZysNtJ4s#(1lQ</text:p>
          </table:table-cell>
          <table:table-cell/>
        </table:table-row>
        <table:table-row table:style-name="ro3">
          <table:table-cell table:style-name="ce6" office:value-type="string" calcext:value-type="string">
            <text:p>Psprjf :</text:p>
          </table:table-cell>
          <table:table-cell table:style-name="ce6" office:value-type="string" calcext:value-type="string">
            <text:p>JsiHKoB7s#(5h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-&gt; optional</text:p>
          </table:table-cell>
          <table:table-cell table:number-columns-repeated="2"/>
        </table:table-row>
        <table:table-row table:style-name="ro8">
          <table:table-cell table:style-name="ce5" office:value-type="string" calcext:value-type="string">
            <text:p/>
            <text:p><text:span text:style-name="T3">data_capture_role: </text:span><text:span text:style-name="T3"><text:a xlink:href="mailto:e#xc91kggPQ@34" xlink:type="simple">e#xc91kggPQ@34</text:a></text:span></text:p>
          </table:table-cell>
          <table:table-cell table:style-name="ce26"/>
          <table:table-cell/>
        </table:table-row>
        <table:table-row table:style-name="ro3">
          <table:table-cell table:style-name="ce6" office:value-type="string" calcext:value-type="string">
            <text:p>perf_test: Perf#123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pspval: pspval#123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7" office:value-type="string" calcext:value-type="string">
            <text:p>Audit staging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>
            <text:p>Cluster</text:p>
          </table:table-cell>
          <table:table-cell table:style-name="ce6" office:value-type="string" calcext:value-type="string">
            <text:p><text:s/>Ppsp-par-aud</text:p>
          </table:table-cell>
          <table:table-cell/>
        </table:table-row>
        <table:table-row table:style-name="ro1">
          <table:table-cell office:value-type="string" calcext:value-type="string">
            <text:p>DB: </text:p>
          </table:table-cell>
          <table:table-cell table:style-name="ce2" office:value-type="string" calcext:value-type="string">
            <text:p>parapgib</text:p>
          </table:table-cell>
          <table:table-cell/>
        </table:table-row>
        <table:table-row table:style-name="ro3">
          <table:table-cell office:value-type="string" calcext:value-type="string">
            <text:p>postgres</text:p>
          </table:table-cell>
          <table:table-cell table:style-name="ce6" office:value-type="string" calcext:value-type="string">
            <text:p>HV32pts0PUD=4lWpicaRyz^og-GKz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table:style-name="ce6" office:value-type="string" calcext:value-type="string">
            <text:p>ibobadm_owner</text:p>
          </table:table-cell>
          <table:table-cell table:style-name="ce6" office:value-type="string" calcext:value-type="string">
            <text:p>Ys8#lqTI)5B1o</text:p>
          </table:table-cell>
          <table:table-cell/>
        </table:table-row>
        <table:table-row table:style-name="ro3">
          <table:table-cell table:style-name="ce6" office:value-type="string" calcext:value-type="string">
            <text:p>ibob_prl_pspapp</text:p>
          </table:table-cell>
          <table:table-cell table:style-name="ce6" office:value-type="string" calcext:value-type="string">
            <text:p>Vp3zu#JA7M5)a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7" office:value-type="string" calcext:value-type="string">
            <text:p>ARC-Stag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uster:</text:p>
          </table:table-cell>
          <table:table-cell table:style-name="ce6" office:value-type="string" calcext:value-type="string">
            <text:p><text:s/>Ppsp-stg-arc</text:p>
          </table:table-cell>
          <table:table-cell/>
        </table:table-row>
        <table:table-row table:style-name="ro3">
          <table:table-cell table:style-name="ce5" office:value-type="string" calcext:value-type="string">
            <text:p>DB: </text:p>
          </table:table-cell>
          <table:table-cell table:style-name="ce6" office:value-type="string" calcext:value-type="string">
            <text:p>psparcdb</text:p>
          </table:table-cell>
          <table:table-cell/>
        </table:table-row>
        <table:table-row table:style-name="ro3">
          <table:table-cell table:style-name="ce5" office:value-type="string" calcext:value-type="string">
            <text:p>intuadmin: </text:p>
          </table:table-cell>
          <table:table-cell table:style-name="ce3" office:value-type="string" calcext:value-type="string">
            <text:p>8RYexUiSyTq5,kk6mWeZ_t9RiFoP-euq</text:p>
          </table:table-cell>
          <table:table-cell/>
        </table:table-row>
        <table:table-row table:style-name="ro3">
          <table:table-cell table:style-name="ce5" office:value-type="string" calcext:value-type="string">
            <text:p>psparc_owner : </text:p>
          </table:table-cell>
          <table:table-cell table:style-name="ce6" office:value-type="string" calcext:value-type="string">
            <text:p>PGhdfD#rSDQRW#23</text:p>
          </table:table-cell>
          <table:table-cell/>
        </table:table-row>
        <table:table-row table:style-name="ro3">
          <table:table-cell table:style-name="ce5" office:value-type="string" calcext:value-type="string">
            <text:p>psparcapp</text:p>
          </table:table-cell>
          <table:table-cell table:style-name="ce6" office:value-type="string" calcext:value-type="string">
            <text:p>P2xcB#dfrSDQ</text:p>
          </table:table-cell>
          <table:table-cell/>
        </table:table-row>
      </table:table>
      <table:table table:name="non-prod" table:style-name="ta1">
        <table:table-column table:style-name="co7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row table:style-name="ro9">
          <table:table-cell table:style-name="ce9" office:value-type="string" calcext:value-type="string">
            <text:p><text:span text:style-name="T4">Monolith PDS:</text:span></text:p>
            <text:p><text:span text:style-name="T5">Host: ppsp-pds-uw02.cluster-ccqjgvvo0rwy.us-west-2.rds.amazonaws.com</text:span></text:p>
            <text:p><text:span text:style-name="T5">port:5432</text:span></text:p>
            <text:p><text:span text:style-name="T5">service:ppdspg02</text:span></text:p>
            <text:p><text:span text:style-name="T5">postgres: changeme</text:span></text:p>
            <text:p><text:span text:style-name="T5">Appuser: pspapp</text:span></text:p>
            <text:p><text:span text:style-name="T5">pasword:  IgRgK7d#PrG</text:span></text:p>
            <text:p><text:span text:style-name="T6">psp_pds_read : PG^jW7ijCb</text:span></text:p>
            <text:p><text:span text:style-name="T6">East:</text:span></text:p>
            <text:p><text:span text:style-name="T6">psp_payroll_dm_ue2--&gt;  PsB#N4uLG)DS</text:span></text:p>
            <text:p><text:span text:style-name="T6">pspapp_ue2  --&gt; ViqB#URSLG)P</text:span></text:p>
            <text:p><text:span text:style-name="T6">pspbatch_ro_user_ue2 --&gt; PiqBUxtLG)aD</text:span></text:p>
            <text:p><text:span text:style-name="T6">pspbatch_rw_user_ue2 --&gt; NIViqB#N4uLG)aD</text:span></text:p>
            <text:p><text:span text:style-name="T6">pspread_ue2 --&gt; NiqB#N4uLG)PDS</text:span></text:p>
            <text:p><text:span text:style-name="T6">psprjf_ue2 --&gt; PiqB#N4uLG)a</text:span></text:p>
            <text:p/>
            <text:p><text:span text:style-name="T6">West:</text:span></text:p>
            <text:p><text:span text:style-name="T6">pspadm_owner -&gt; ﻿Pp3zu#JA7M5</text:span></text:p>
            <text:p><text:span text:style-name="T6">psp_payroll_dm--&gt; NPUB#N4uUII</text:span></text:p>
            <text:p><text:span text:style-name="T6">pspbatch_ro_user--&gt; LiQBUxtLG)LH</text:span></text:p>
            <text:p><text:span text:style-name="T6">pspbatch_rw_user--&gt; LhaqB#N4G)DH</text:span></text:p>
            <text:p><text:span text:style-name="T6">pspread--&gt; USqB#N4uLG)NLS</text:span></text:p>
            <text:p><text:span text:style-name="T6">psprjf--&gt; QMLqB#N4uLG)PS</text:span></text:p>
            <text:p/>
            <text:p><text:span text:style-name="T6">data_capture_role</text:span></text:p>
            <text:p><text:span text:style-name="T7"><text:a xlink:href="mailto:e#xc91kggPQ@34" xlink:type="simple">e#xc91kggPQ@34</text:a></text:span></text:p>
            <text:p/>
            <text:p/>
            <text:p><text:span text:style-name="T7">PPSP-SYS-MON</text:span></text:p>
            <text:p/>
            <text:p><text:span text:style-name="T7">Host : ppsp-sys-mon.cluster-ccqjgvvo0rwy.us-west-2.rds.amazonaws.com</text:span></text:p>
            <text:p><text:span text:style-name="T7">Port: 5432</text:span></text:p>
            <text:p><text:span text:style-name="T7">DB Name: psyspg01 </text:span></text:p>
            <text:p><text:span text:style-name="T7">Username:pspadm_owner</text:span></text:p>
            <text:p><text:span text:style-name="T7">Password: p3zu#JAaPR</text:span></text:p>
            <text:p/>
            <text:p><text:span text:style-name="T7">Username: pspapp</text:span></text:p>
            <text:p><text:span text:style-name="T7">password: K0tvv1Y.j5kZBg</text:span></text:p>
            <text:p/>
            <text:p/>
            <text:p><text:span text:style-name="T7">ppsp-pds-mon</text:span></text:p>
            <text:p><text:span text:style-name="T7">Host: ppsp-pds-mon.cluster-ccqjgvvo0rwy.us-west-2.rds.amazonaws.com</text:span></text:p>
            <text:p><text:span text:style-name="T7">DBname:pspe2euw</text:span></text:p>
            <text:p><text:span text:style-name="T7">Username : mon_pds_pspapp </text:span></text:p>
            <text:p><text:span text:style-name="T7">password: monolith@123</text:span></text:p>
            <text:p><text:span text:style-name="T7">schemaname : pspadm</text:span></text:p>
            <text:p><text:span text:style-name="T7">Username: pspadm_owner</text:span></text:p>
            <text:p><text:span text:style-name="T7">Password : pspadm@123</text:span></text:p>
            <text:p/>
            <text:p/>
            <text:p/>
            <text:p/>
          </table:table-cell>
          <table:table-cell table:style-name="ce10" office:value-type="string" calcext:value-type="string">
            <text:p><text:span text:style-name="T10">Audit</text:span></text:p>
            <text:p><text:span text:style-name="T10">Endpoint:</text:span></text:p>
            <text:p><text:span text:style-name="T11">ppsp-pds-db.cluster-ccqjgvvo0rwy.us-west-2.rds.amazonaws.com</text:span></text:p>
            <text:p><text:span text:style-name="T12">User: postgres</text:span></text:p>
            <text:p><text:span text:style-name="T11">password:  jQ=Xv=Ga^jW7ijCbA0y-NzJot-hqlH</text:span></text:p>
            <text:p/>
            <text:p><text:span text:style-name="T10">Endpoint:</text:span></text:p>
            <text:p><text:span text:style-name="T11">spsp-sys-db.cluster-ccqjgvvo0rwy.us-west-2.rds.amazonaws.com</text:span></text:p>
            <text:p><text:span text:style-name="T11">db name: sysibobdb</text:span></text:p>
            <text:p><text:span text:style-name="T11">Postgres : jQ=Xv=Ga^jW7ijCbA0y-NzJot-hqlH</text:span></text:p>
            <text:p/>
            <text:p/>
            <text:p/>
            <text:p/>
            <text:p/>
            <text:p/>
            <text:p/>
            <text:p><text:span text:style-name="T11">DS1:</text:span></text:p>
            <text:p><text:span text:style-name="T11">hostname: psp-shared-aud.cluster-ccqjgvvo0rwy.us-west-2.rds.amazonaws.com</text:span></text:p>
            <text:p><text:span text:style-name="T11">service name/database name: pspds1db</text:span></text:p>
            <text:p><text:span text:style-name="T11">Username : ibob_ds1_pspapp</text:span></text:p>
            <text:p><text:span text:style-name="T11">schemaname : ibobadm</text:span></text:p>
            <text:p/>
            <text:p><text:span text:style-name="T11">Perf:</text:span></text:p>
            <text:p><text:span text:style-name="T11">hostname: psp-shared-aud.cluster-ccqjgvvo0rwy.us-west-2.rds.amazonaws.com</text:span></text:p>
            <text:p><text:span text:style-name="T11">Port: 5432</text:span></text:p>
            <text:p><text:span text:style-name="T11">service name/database name: pspprfdb</text:span></text:p>
            <text:p><text:span text:style-name="T11">Username : ibob_perf_pspapp</text:span></text:p>
            <text:p><text:span text:style-name="T11">schemaname : ibobadm</text:span></text:p>
            <text:p/>
            <text:p/>
            <text:p><text:span text:style-name="T11">ibobadm_owner: ibobaud@123</text:span></text:p>
            <text:p><text:span text:style-name="T11">ibob_ds1_pspapp : ibobaudds1@123</text:span></text:p>
            <text:p><text:span text:style-name="T11">ibobadm_ds1_readonly : ibobadmds@123</text:span></text:p>
            <text:p/>
            <text:p><text:span text:style-name="T11">ibob_perf_pspapp : ibobaudperf@123</text:span></text:p>
            <text:p><text:span text:style-name="T11">ibobadm_perf_readonly : ibobadmperf@123</text:span></text:p>
            <text:p/>
          </table:table-cell>
          <table:table-cell table:style-name="ce10" table:number-columns-repeated="4"/>
          <table:table-cell office:value-type="string" calcext:value-type="string">
            <text:p><text:span text:style-name="T13">SQO</text:span></text:p>
            <text:p><text:span text:style-name="T14">hostname: ppsp-ppd-sqo.cluster-ccqjgvvo0rwy.us-west-2.rds.amazonaws.com</text:span></text:p>
            <text:p><text:span text:style-name="T15">port: 5432 </text:span></text:p>
            <text:p><text:span text:style-name="T15">DBname: ppspsodb</text:span></text:p>
            <text:p><text:span text:style-name="T15">Object Owner credentials : soadm_owner / Bl8p#uOPT1s </text:span></text:p>
            <text:p><text:span text:style-name="T15">Application user credentials : soapp / Ez#Ga3h8uFi</text:span></text:p>
            <text:p/>
          </table:table-cell>
          <table:table-cell office:value-type="string" calcext:value-type="string">
            <text:p><text:span text:style-name="T13">ARC</text:span></text:p>
            <text:p><text:span text:style-name="T15">Hostname: ppsp-ppd-arc.cluster-ccqjgvvo0rwy.us-west-2.rds.amazonaws.com</text:span></text:p>
            <text:p><text:span text:style-name="T15">port: 5432</text:span></text:p>
            <text:p><text:span text:style-name="T15">service_name: psppdarc</text:span></text:p>
            <text:p><text:span text:style-name="T15">read/write user: psparcapp</text:span></text:p>
            <text:p><text:span text:style-name="T15">password: PspArcXcZ@</text:span></text:p>
            <text:p><text:span text:style-name="T15">psparc_owner: psparc#123</text:span></text:p>
            <text:p><text:span text:style-name="T15">intuadmin: cJ86WjLGoZheFG5NRo97gg.68lOu.--7</text:span></text:p>
            <text:p/>
          </table:table-cell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 table:number-rows-repeated="36">
          <table:table-cell table:number-columns-repeated="8"/>
        </table:table-row>
        <table:table-row table:style-name="ro1">
          <table:table-cell table:style-name="ce2" office:value-type="string" calcext:value-type="string">
            <text:p>svc_wpcm_fa: Tqaz#2025Wsxe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28" office:value-type="string" calcext:value-type="string">
            <text:p>ppsp-pds-uw02 <text:s/>H=4^DBxK=KLOg7=Og3uuAfAa3ZLsnPK4</text:p>
          </table:table-cell>
          <table:table-cell table:number-columns-repeated="7"/>
        </table:table-row>
        <table:table-row table:style-name="ro1">
          <table:table-cell table:style-name="ce28" office:value-type="string" calcext:value-type="string">
            <text:p>ppsp-sys-mon cL.GBOhq55=5UIp,ROIoYowWv8frmo</text:p>
          </table:table-cell>
          <table:table-cell table:number-columns-repeated="7"/>
        </table:table-row>
        <table:table-row table:style-name="ro3">
          <table:table-cell table:style-name="ce17" office:value-type="string" calcext:value-type="string">
            <text:p>spsp-sys-db yEd29rq5-kLjGLOD,j=7X7tYjOAF4L^9</text:p>
          </table:table-cell>
          <table:table-cell table:number-columns-repeated="7"/>
        </table:table-row>
        <table:table-row table:style-name="ro3">
          <table:table-cell table:style-name="ce17" office:value-type="string" calcext:value-type="string">
            <text:p>ppsp-pds-db Po77wEZS.N-XGsZ951ldye7Hqv77Q-N_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style-name="ce17" office:value-type="string" calcext:value-type="string">
            <text:p>ppsp-pds-uw02 vtJSk=qh_2=kIAX971vXTzt31T5K-XnA</text:p>
          </table:table-cell>
          <table:table-cell table:number-columns-repeated="7"/>
        </table:table-row>
        <table:table-row table:style-name="ro3">
          <table:table-cell table:style-name="ce17" office:value-type="string" calcext:value-type="string">
            <text:p>ppsp-sys-mon changeme</text:p>
          </table:table-cell>
          <table:table-cell table:number-columns-repeated="7"/>
        </table:table-row>
        <table:table-row table:style-name="ro3">
          <table:table-cell table:style-name="ce17" office:value-type="string" calcext:value-type="string">
            <text:p>spsp-sys-db hhHURebLyNDAA0O=1KhsC.iyVJyuw_j3</text:p>
          </table:table-cell>
          <table:table-cell table:number-columns-repeated="7"/>
        </table:table-row>
        <table:table-row table:style-name="ro3">
          <table:table-cell table:style-name="ce17" office:value-type="string" calcext:value-type="string">
            <text:p>ppsp-pds-db 4w_MB1mFzc7zoe2yPS7h,2vX9Wdh7XE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psmonuser HcPeLzL6K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18" office:value-type="string" calcext:value-type="string">
            <text:p>kIAX971vXTzt31T5K-XnA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jH0FEvYhmd3RGOe*u&l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psp-ppd-sqo: <text:s text:c="2"/>changeme</text:p>
          </table:table-cell>
          <table:table-cell table:number-columns-repeated="7"/>
        </table:table-row>
        <table:table-row table:style-name="ro10">
          <table:table-cell table:style-name="ce38" office:value-type="string" calcext:value-type="string">
            <text:p>Ppsp-ppd-arc: <text:span text:style-name="T8">cJ86WjLGoZheFG5NRo97gg.68lOu.--7</text:span>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psp-sys-mon changeme</text:p>
            <text:p>spsp-sys-db hhHURebLyNDAA0O=1KhsC.iyVJyuw_j3</text:p>
            <text:p>ppsp-pds-db intuit01</text:p>
            <text:p>ppsp-ppd-arc cJ86WjLGoZheFG5NRo97gg.68lOu.--7</text:p>
            <text:p>ppsp-ppd-sqo changem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1">
          <table:table-cell office:value-type="string" calcext:value-type="string">
            <text:p>Ppsp-pds-uw02  <text:span text:style-name="T9">vtJSk=qh_2=kIAX971vXTzt31T5K-XnA</text:span></text:p>
          </table:table-cell>
          <table:table-cell table:number-columns-repeated="7"/>
        </table:table-row>
      </table:table>
      <table:table table:name="Query-sheet" table:style-name="ta1">
        <table:table-column table:style-name="co9" table:default-cell-style-name="Default"/>
        <table:table-column table:style-name="co10" table:default-cell-style-name="ce2"/>
        <table:table-row table:style-name="ro1">
          <table:table-cell office:value-type="string" calcext:value-type="string">
            <text:p>active running</text:p>
          </table:table-cell>
          <table:table-cell office:value-type="string" calcext:value-type="string">
            <text:p>SELECT pid, query, state, query_start, now() - query_start AS execution_time FROM pg_stat_activity WHERE state = 'active';</text:p>
          </table:table-cell>
        </table:table-row>
        <table:table-row table:style-name="ro12">
          <table:table-cell office:value-type="string" calcext:value-type="string">
            <text:p>connections</text:p>
          </table:table-cell>
          <table:table-cell table:style-name="ce19" office:value-type="string" calcext:value-type="string">
            <text:p>SELECT datname,usename,</text:p>
            <text:p>coalesce(client_hostname, client_addr::text, 'localhost') as client_hostname,application_name,count(*)</text:p>
            <text:p>from pg_stat_activity</text:p>
            <text:p>where pid != pg_backend_pid() and usename not in ('postgres','rdsadmin','ggs','postgresi')</text:p>
            <text:p>group by datname,usename,</text:p>
            <text:p>coalesce(client_hostname, client_addr::text, 'localhost'),application_name</text:p>
            <text:p>order by usename;</text:p>
          </table:table-cell>
        </table:table-row>
        <table:table-row table:style-name="ro13">
          <table:table-cell office:value-type="string" calcext:value-type="string">
            <text:p>blocking session</text:p>
          </table:table-cell>
          <table:table-cell table:style-name="ce12" office:value-type="string" calcext:value-type="string">
            <text:p>SELECT blocked_locks.pid     AS blocked_pid,</text:p>
            <text:p>       blocked_activity.usename  AS blocked_user,</text:p>
            <text:p>       blocked_activity.client_addr as blocked_client_addr,</text:p>
            <text:p>       blocked_activity.client_hostname as blocked_client_hostname,</text:p>
            <text:p>       blocked_activity.client_port as blocked_client_port,</text:p>
            <text:p>       blocked_activity.application_name as blocked_application_name,</text:p>
            <text:p>       blocked_activity.wait_event_type as blocked_wait_event_type,</text:p>
            <text:p>       blocked_activity.wait_event as blocked_wait_event,</text:p>
            <text:p>       blocked_activity.query    AS blocked_statement,</text:p>
            <text:p>       blocking_locks.pid     AS blocking_pid,</text:p>
            <text:p>       blocking_activity.usename AS blocking_user,</text:p>
            <text:p>       blocking_activity.client_addr as blocking_user_addr,</text:p>
            <text:p>       blocking_activity.client_hostname as blocking_client_hostname,</text:p>
            <text:p>       blocking_activity.client_port as blocking_client_port,</text:p>
            <text:p>       blocking_activity.application_name as blocking_application_name,</text:p>
            <text:p>       blocking_activity.wait_event_type as blocking_wait_event_type,</text:p>
            <text:p>       blocking_activity.wait_event as blocking_wait_event,</text:p>
            <text:p>       blocking_activity.query   AS current_statement_in_blocking_process,</text:p>
            <text:p>       now() - blocked_activity.query_start as Blocking_duration</text:p>
            <text:p>FROM  pg_catalog.pg_locks         blocked_locks</text:p>
            <text:p>          JOIN pg_catalog.pg_stat_activity blocked_activity ON blocked_activity.pid = blocked_locks.pid</text:p>
            <text:p>          JOIN pg_catalog.pg_locks         blocking_locks</text:p>
            <text:p>               ON blocking_locks.locktype = blocked_locks.locktype</text:p>
            <text:p>                   AND blocking_locks.DATABASE IS NOT DISTINCT FROM blocked_locks.DATABASE</text:p>
            <text:p>                   AND blocking_locks.relation IS NOT DISTINCT FROM blocked_locks.relation</text:p>
            <text:p>                   AND blocking_locks.page IS NOT DISTINCT FROM blocked_locks.page</text:p>
            <text:p>                   AND blocking_locks.tuple IS NOT DISTINCT FROM blocked_locks.tuple</text:p>
            <text:p>                   AND blocking_locks.virtualxid IS NOT DISTINCT FROM blocked_locks.virtualxid</text:p>
            <text:p>                   AND blocking_locks.transactionid IS NOT DISTINCT FROM blocked_locks.transactionid</text:p>
            <text:p>                   AND blocking_locks.classid IS NOT DISTINCT FROM blocked_locks.classid</text:p>
            <text:p>                   AND blocking_locks.objid IS NOT DISTINCT FROM blocked_locks.objid</text:p>
            <text:p>                   AND blocking_locks.objsubid IS NOT DISTINCT FROM blocked_locks.objsubid</text:p>
            <text:p>                   AND blocking_locks.pid != blocked_locks.pid</text:p>
            <text:p>          JOIN pg_catalog.pg_stat_activity blocking_activity ON blocking_activity.pid = blocking_locks.pid</text:p>
            <text:p>WHERE NOT blocked_locks.granted ORDER BY blocked_activity.pid;</text:p>
          </table:table-cell>
        </table:table-row>
        <table:table-row table:style-name="ro14">
          <table:table-cell office:value-type="string" calcext:value-type="string">
            <text:p>check roles</text:p>
          </table:table-cell>
          <table:table-cell table:style-name="Default" office:value-type="string" calcext:value-type="string">
            <text:p>select rolname,rolcanloginfrom pg_roleswhere rolname in ('ibobadm_owner','ibob_prod_pspapp','ibobadm_readonly');</text:p>
            <text:p/>
          </table:table-cell>
        </table:table-row>
        <table:table-row table:style-name="ro1">
          <table:table-cell office:value-type="string" calcext:value-type="string">
            <text:p>drop replication</text:p>
          </table:table-cell>
          <table:table-cell office:value-type="string" calcext:value-type="string">
            <text:p>select pg_drop_replication_slot('&lt;slot_name&gt;') from pg_replication_slots;</text:p>
          </table:table-cell>
        </table:table-row>
        <table:table-row table:style-name="ro1">
          <table:table-cell office:value-type="string" calcext:value-type="string">
            <text:p>cronjob check</text:p>
          </table:table-cell>
          <table:table-cell office:value-type="string" calcext:value-type="string">
            <text:p>SELECT * FROM cron.job; SELECT * FROM cron.job_run_detail</text:p>
          </table:table-cell>
        </table:table-row>
        <table:table-row table:style-name="ro15">
          <table:table-cell office:value-type="string" calcext:value-type="string">
            <text:p>check dead tuples</text:p>
          </table:table-cell>
          <table:table-cell table:style-name="Default" office:value-type="string" calcext:value-type="string">
            <text:p>SELECT </text:p>
            <text:p>    relname AS table_name,</text:p>
            <text:p>    n_dead_tup AS dead_tuples</text:p>
            <text:p>FROM</text:p>
            <text:p>    pg_stat_user_tables</text:p>
            <text:p>WHERE</text:p>
            <text:p>    n_dead_tup &gt; 50000;</text:p>
          </table:table-cell>
        </table:table-row>
        <table:table-row table:style-name="ro1">
          <table:table-cell office:value-type="string" calcext:value-type="string">
            <text:p>check <text:s/>age and dead tuple</text:p>
          </table:table-cell>
          <table:table-cell office:value-type="string" calcext:value-type="string">
            <text:p>SELECT c.relname AS table_name, age(c.relfrozenxid) AS frozen_xid_age, pg_size_pretty(pg_table_size(c.oid)) as table_size, pg_size_pretty(pg_total_relation_size(c.oid)) AS total_size, ps.n_live_tup,c.reltuples, ps.n_dead_tup, trunc(100*ps.n_dead_tup/(c.reltuples+1))::float "ratio%", ps.last_autovacuum, ps.autovacuum_count FROM pg_class c JOIN pg_namespace n ON c.relnamespace = n.oid JOIN pg_stat_all_tables ps ON c.relname = ps.relname WHERE c.relkind='r' AND n.nspname IN ('pspadm') AND ps.n_dead_tup &gt; 500000 AND c.reltuples&lt;&gt;-1 ORDER BY 7 desc limit 100;</text:p>
          </table:table-cell>
        </table:table-row>
        <table:table-row table:style-name="ro1">
          <table:table-cell table:style-name="ce2" office:value-type="string" calcext:value-type="string">
            <text:p>Monitor the Progress of the VACUUM Command</text:p>
          </table:table-cell>
          <table:table-cell office:value-type="string" calcext:value-type="string">
            <text:p>select pid, datid, datname, relid::regclass, phase, heap_blks_total, heap_blks_scanned, heap_blks_vacuumed, index_vacuum_count, max_dead_tuples, num_dead_tuples from pg_stat_progress_vacuum;</text:p>
          </table:table-cell>
        </table:table-row>
        <table:table-row table:style-name="ro3">
          <table:table-cell/>
          <table:table-cell table:style-name="ce3" office:value-type="string" calcext:value-type="string">
            <text:p>ps aux | grep ssh</text:p>
          </table:table-cell>
        </table:table-row>
        <table:table-row table:style-name="ro3">
          <table:table-cell/>
          <table:table-cell table:style-name="ce18" office:value-type="string" calcext:value-type="string">
            <text:p>pkill ssh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--kill session</text:p>
          </table:table-cell>
          <table:table-cell office:value-type="string" calcext:value-type="string">
            <text:p><text:s/>select pg_terminate_backend(pid) from pg_stat_activity where pid in ('78589');</text:p>
          </table:table-cell>
        </table:table-row>
      </table:table>
      <table:table table:name="Sheet5" table:style-name="ta1">
        <table:table-column table:style-name="co4" table:number-columns-repeated="7" table:default-cell-style-name="Default"/>
        <table:table-row table:style-name="ro3">
          <table:table-cell/>
          <table:table-cell table:style-name="ce18" office:value-type="string" calcext:value-type="string">
            <text:p>sed -i 's/export AWS_DEFAULT_REGION=/#export AWS_DEFAULT_REGION=/g' chk_active_session_pg.sh chk_db_max_tran_id_pg.sh chk_catalog_size_pg.sh chk_long_running_queries_pg.sh chk_blocking_queries_pg.sh</text:p>
          </table:table-cell>
          <table:table-cell table:number-columns-repeated="5"/>
        </table:table-row>
        <table:table-row table:style-name="ro1" table:number-rows-repeated="36">
          <table:table-cell table:number-columns-repeated="7"/>
        </table:table-row>
        <table:table-row table:style-name="ro14">
          <table:table-cell table:number-columns-repeated="2"/>
          <table:table-cell table:style-name="ce32" office:value-type="string" calcext:value-type="string">
            <text:p>Instance size</text:p>
          </table:table-cell>
          <table:table-cell table:style-name="ce32" office:value-type="string" calcext:value-type="string">
            <text:p>db.r6g.16xlarge</text:p>
          </table:table-cell>
          <table:table-cell table:style-name="ce33" table:number-columns-repeated="2"/>
          <table:table-cell/>
        </table:table-row>
        <table:table-row table:style-name="ro1">
          <table:table-cell table:number-columns-repeated="2"/>
          <table:table-cell table:style-name="ce33"/>
          <table:table-cell table:style-name="ce32" office:value-type="string" calcext:value-type="string">
            <text:p>Warning</text:p>
          </table:table-cell>
          <table:table-cell table:style-name="ce32" office:value-type="string" calcext:value-type="string">
            <text:p>critical</text:p>
          </table:table-cell>
          <table:table-cell table:style-name="ce33"/>
          <table:table-cell/>
        </table:table-row>
        <table:table-row table:style-name="ro1">
          <table:table-cell table:number-columns-repeated="2"/>
          <table:table-cell table:style-name="ce32" office:value-type="string" calcext:value-type="string">
            <text:p>CPU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0" calcext:value-type="float">
            <text:p>60</text:p>
          </table:table-cell>
          <table:table-cell table:style-name="ce33"/>
          <table:table-cell/>
        </table:table-row>
        <table:table-row table:style-name="ro1">
          <table:table-cell table:number-columns-repeated="2"/>
          <table:table-cell table:style-name="ce32" office:value-type="string" calcext:value-type="string">
            <text:p>WriteIOPS</text:p>
          </table:table-cell>
          <table:table-cell table:style-name="ce32" office:value-type="float" office:value="30000" calcext:value-type="float">
            <text:p>30000</text:p>
          </table:table-cell>
          <table:table-cell table:style-name="ce32" office:value-type="float" office:value="80000" calcext:value-type="float">
            <text:p>80000</text:p>
          </table:table-cell>
          <table:table-cell table:style-name="ce33"/>
          <table:table-cell/>
        </table:table-row>
        <table:table-row table:style-name="ro1">
          <table:table-cell table:number-columns-repeated="2"/>
          <table:table-cell table:style-name="ce32" office:value-type="string" calcext:value-type="string">
            <text:p>ReadIOPS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float" office:value="150000" calcext:value-type="float">
            <text:p>150000</text:p>
          </table:table-cell>
          <table:table-cell table:style-name="ce33"/>
          <table:table-cell/>
        </table:table-row>
        <table:table-row table:style-name="ro14">
          <table:table-cell table:number-columns-repeated="2"/>
          <table:table-cell table:style-name="ce32" office:value-type="string" calcext:value-type="string">
            <text:p>FreeableMemory</text:p>
          </table:table-cell>
          <table:table-cell table:style-name="ce32" office:value-type="float" office:value="118111600640" calcext:value-type="float">
            <text:p>118111600640</text:p>
          </table:table-cell>
          <table:table-cell table:style-name="ce32" office:value-type="float" office:value="107374182400" calcext:value-type="float">
            <text:p>107374182400</text:p>
          </table:table-cell>
          <table:table-cell table:style-name="ce33"/>
          <table:table-cell/>
        </table:table-row>
        <table:table-row table:style-name="ro14">
          <table:table-cell table:number-columns-repeated="2"/>
          <table:table-cell table:style-name="ce32" office:value-type="string" calcext:value-type="string">
            <text:p>FreeLocal-Storage</text:p>
          </table:table-cell>
          <table:table-cell table:style-name="ce32" office:value-type="float" office:value="214748364800" calcext:value-type="float">
            <text:p>214748364800</text:p>
          </table:table-cell>
          <table:table-cell table:style-name="ce32" office:value-type="float" office:value="107374182400" calcext:value-type="float">
            <text:p>107374182400</text:p>
          </table:table-cell>
          <table:table-cell table:style-name="ce33"/>
          <table:table-cell/>
        </table:table-row>
        <table:table-row table:style-name="ro14">
          <table:table-cell table:number-columns-repeated="2"/>
          <table:table-cell table:style-name="ce32" office:value-type="string" calcext:value-type="string">
            <text:p>MaximumUsedTransactionID</text:p>
          </table:table-cell>
          <table:table-cell table:style-name="ce32" office:value-type="float" office:value="205000000" calcext:value-type="float">
            <text:p>205000000</text:p>
          </table:table-cell>
          <table:table-cell table:style-name="ce32" office:value-type="float" office:value="210000000" calcext:value-type="float">
            <text:p>210000000</text:p>
          </table:table-cell>
          <table:table-cell table:style-name="ce32" office:value-type="string" calcext:value-type="string">
            <text:p>Audit DB</text:p>
          </table:table-cell>
          <table:table-cell/>
        </table:table-row>
        <table:table-row table:style-name="ro14">
          <table:table-cell table:number-columns-repeated="2"/>
          <table:table-cell table:style-name="ce32" office:value-type="string" calcext:value-type="string">
            <text:p>ReplicationSlotDiskUsage</text:p>
          </table:table-cell>
          <table:table-cell table:style-name="ce32" office:value-type="float" office:value="214748364800" calcext:value-type="float">
            <text:p>214748364800</text:p>
          </table:table-cell>
          <table:table-cell table:style-name="ce32" office:value-type="float" office:value="107374182400" calcext:value-type="float">
            <text:p>107374182400</text:p>
          </table:table-cell>
          <table:table-cell table:style-name="ce33"/>
          <table:table-cell/>
        </table:table-row>
        <table:table-row table:style-name="ro14">
          <table:table-cell table:number-columns-repeated="2"/>
          <table:table-cell table:style-name="ce32" office:value-type="string" calcext:value-type="string">
            <text:p>DatabaseConnections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400" calcext:value-type="float">
            <text:p>1400</text:p>
          </table:table-cell>
          <table:table-cell table:style-name="ce33"/>
          <table:table-cell/>
        </table:table-row>
        <table:table-row table:style-name="ro14">
          <table:table-cell table:number-columns-repeated="2"/>
          <table:table-cell table:style-name="ce32" office:value-type="string" calcext:value-type="string">
            <text:p>TransactionLogsDiskUsage</text:p>
          </table:table-cell>
          <table:table-cell table:style-name="ce32" office:value-type="float" office:value="64424509440" calcext:value-type="float">
            <text:p>64424509440</text:p>
          </table:table-cell>
          <table:table-cell table:style-name="ce32" office:value-type="float" office:value="107374182400" calcext:value-type="float">
            <text:p>107374182400</text:p>
          </table:table-cell>
          <table:table-cell table:style-name="ce33"/>
          <table:table-cell/>
        </table:table-row>
        <table:table-row table:style-name="ro1">
          <table:table-cell table:number-columns-repeated="2"/>
          <table:table-cell table:style-name="ce32" office:value-type="string" calcext:value-type="string">
            <text:p>PGcatalogSize</text:p>
          </table:table-cell>
          <table:table-cell table:style-name="ce33" table:number-columns-repeated="3"/>
          <table:table-cell/>
        </table:table-row>
        <table:table-row table:style-name="ro14">
          <table:table-cell table:number-columns-repeated="2"/>
          <table:table-cell table:style-name="ce32" office:value-type="string" calcext:value-type="string">
            <text:p>DatabaseActiveConnections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40" calcext:value-type="float">
            <text:p>240</text:p>
          </table:table-cell>
          <table:table-cell table:style-name="ce33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0" calcext:value-type="float">
            <text:p>60</text:p>
          </table:table-cell>
          <table:table-cell table:style-name="ce33"/>
        </table:table-row>
        <table:table-row table:style-name="ro1">
          <table:table-cell table:number-columns-repeated="4"/>
          <table:table-cell table:style-name="ce32" office:value-type="float" office:value="30000" calcext:value-type="float">
            <text:p>30000</text:p>
          </table:table-cell>
          <table:table-cell table:style-name="ce32" office:value-type="float" office:value="80000" calcext:value-type="float">
            <text:p>80000</text:p>
          </table:table-cell>
          <table:table-cell table:style-name="ce33"/>
        </table:table-row>
        <table:table-row table:style-name="ro1">
          <table:table-cell table:number-columns-repeated="4"/>
          <table:table-cell table:style-name="ce32" office:value-type="float" office:value="100000" calcext:value-type="float">
            <text:p>100000</text:p>
          </table:table-cell>
          <table:table-cell table:style-name="ce32" office:value-type="float" office:value="150000" calcext:value-type="float">
            <text:p>150000</text:p>
          </table:table-cell>
          <table:table-cell table:style-name="ce33"/>
        </table:table-row>
        <table:table-row table:style-name="ro1">
          <table:table-cell table:number-columns-repeated="4"/>
          <table:table-cell table:style-name="ce32" office:value-type="float" office:value="118111600640" calcext:value-type="float">
            <text:p>118111600640</text:p>
          </table:table-cell>
          <table:table-cell table:style-name="ce32" office:value-type="float" office:value="107374182400" calcext:value-type="float">
            <text:p>107374182400</text:p>
          </table:table-cell>
          <table:table-cell table:style-name="ce33"/>
        </table:table-row>
        <table:table-row table:style-name="ro1">
          <table:table-cell table:number-columns-repeated="4"/>
          <table:table-cell table:style-name="ce32" office:value-type="float" office:value="214748364800" calcext:value-type="float">
            <text:p>214748364800</text:p>
          </table:table-cell>
          <table:table-cell table:style-name="ce32" office:value-type="float" office:value="107374182400" calcext:value-type="float">
            <text:p>107374182400</text:p>
          </table:table-cell>
          <table:table-cell table:style-name="ce33"/>
        </table:table-row>
        <table:table-row table:style-name="ro1">
          <table:table-cell table:number-columns-repeated="4"/>
          <table:table-cell table:style-name="ce32" office:value-type="float" office:value="205000000" calcext:value-type="float">
            <text:p>205000000</text:p>
          </table:table-cell>
          <table:table-cell table:style-name="ce32" office:value-type="float" office:value="210000000" calcext:value-type="float">
            <text:p>210000000</text:p>
          </table:table-cell>
          <table:table-cell table:style-name="ce32" office:value-type="string" calcext:value-type="string">
            <text:p>Audit DB</text:p>
          </table:table-cell>
        </table:table-row>
        <table:table-row table:style-name="ro1">
          <table:table-cell table:number-columns-repeated="4"/>
          <table:table-cell table:style-name="ce32" office:value-type="float" office:value="214748364800" calcext:value-type="float">
            <text:p>214748364800</text:p>
          </table:table-cell>
          <table:table-cell table:style-name="ce32" office:value-type="float" office:value="107374182400" calcext:value-type="float">
            <text:p>107374182400</text:p>
          </table:table-cell>
          <table:table-cell table:style-name="ce33"/>
        </table:table-row>
        <table:table-row table:style-name="ro1">
          <table:table-cell table:number-columns-repeated="4"/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400" calcext:value-type="float">
            <text:p>1400</text:p>
          </table:table-cell>
          <table:table-cell table:style-name="ce33"/>
        </table:table-row>
        <table:table-row table:style-name="ro1">
          <table:table-cell table:number-columns-repeated="4"/>
          <table:table-cell table:style-name="ce32" office:value-type="float" office:value="64424509440" calcext:value-type="float">
            <text:p>64424509440</text:p>
          </table:table-cell>
          <table:table-cell table:style-name="ce32" office:value-type="float" office:value="107374182400" calcext:value-type="float">
            <text:p>107374182400</text:p>
          </table:table-cell>
          <table:table-cell table:style-name="ce33"/>
        </table:table-row>
        <table:table-row table:style-name="ro1">
          <table:table-cell table:number-columns-repeated="4"/>
          <table:table-cell table:style-name="ce33" table:number-columns-repeated="3"/>
        </table:table-row>
        <table:table-row table:style-name="ro1">
          <table:table-cell table:number-columns-repeated="4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40" calcext:value-type="float">
            <text:p>240</text:p>
          </table:table-cell>
          <table:table-cell table:style-name="ce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Monaco" svg:font-family="Monaco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 style:data-style-name="N2" text:time-value="18:44:35.88997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5T12:53:35.034335000</meta:creation-date>
    <dc:date>2025-12-29T19:14:50.934775000</dc:date>
    <meta:editing-duration>P18DT19H30M2S</meta:editing-duration>
    <meta:editing-cycles>20</meta:editing-cycles>
    <meta:generator>LibreOffice/25.2.4.3$MacOSX_AARCH64 LibreOffice_project/33e196637044ead23f5c3226cde09b47731f7e27</meta:generator>
    <meta:document-statistic meta:table-count="5" meta:cell-count="178" meta:object-count="0"/>
    <meta:user-defined meta:name=""/>
  </office:meta>
</office:document-meta>
</file>